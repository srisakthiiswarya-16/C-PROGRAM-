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C000003B0FE758EA3772CB87E.jpg" manifest:media-type="image/jpeg"/>
  <manifest:file-entry manifest:full-path="Pictures/10000000000002C0000004444C4A7CD7B24F6714.jpg" manifest:media-type="image/jpeg"/>
  <manifest:file-entry manifest:full-path="Pictures/10000000000002CC000004D4DB0E8E5DCC194E82.jpg" manifest:media-type="image/jpe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.jpg" text:anchor-type="as-char" svg:width="2.3866in" svg:height="4.1201in" draw:z-index="0"><draw:image xlink:href="Pictures/10000000000002CC000004D4DB0E8E5DCC194E82.jpg" xlink:type="simple" xlink:show="embed" xlink:actuate="onLoad" loext:mime-type="image/jpeg"/></draw:frame><draw:frame draw:style-name="fr1" draw:name="image2.jpg" text:anchor-type="as-char" svg:width="2.3465in" svg:height="3.6402in" draw:z-index="0"><draw:image xlink:href="Pictures/10000000000002C0000004444C4A7CD7B24F6714.jpg" xlink:type="simple" xlink:show="embed" xlink:actuate="onLoad" loext:mime-type="image/jpeg"/></draw:frame><draw:frame draw:style-name="fr1" draw:name="image1.jpg" text:anchor-type="as-char" svg:width="2.3866in" svg:height="3.1465in" draw:z-index="0"><draw:image xlink:href="Pictures/10000000000002CC000003B0FE758EA3772CB87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